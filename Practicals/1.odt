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Horizontal_20_Line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Horizontal_20_Line">
      <style:text-properties officeooo:paragraph-rsid="00148ad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estionnaire on Diabetes Mellitus</text:h>
      <text:p text:style-name="Text_20_body"><text:span text:style-name="Strong_20_Emphasis">Participant Information</text:span></text:p>
      <text:p text:style-name="Text_20_body">Name: _______________________</text:p>
      <text:p text:style-name="Text_20_body">Age: ________________________</text:p>
      <text:p text:style-name="Text_20_body">Gender: ☐ Male ☐ Female ☐ Other</text:p>
      <text:p text:style-name="Horizontal_20_Line"/>
      <text:h text:style-name="Heading_20_3" text:outline-level="3">Medical History</text:h>
      <text:list text:style-name="L1">
        <text:list-item>
          <text:p text:style-name="P1">Have you ever been diagnosed with Diabetes?<text:line-break/>☐ Yes<text:line-break/>☐ No </text:p>
        </text:list-item>
        <text:list-item>
          <text:p text:style-name="P1">If yes, what type of Diabetes do you have?<text:line-break/>☐ Type 1<text:line-break/>☐ Type 2<text:line-break/>☐ Gestational Diabetes </text:p>
        </text:list-item>
        <text:list-item>
          <text:p text:style-name="P2">How long have you been living with Diabetes?</text:p>
          <text:p text:style-name="P3"/>
        </text:list-item>
        <text:list-item>
          <text:p text:style-name="P1">Do you take medication regularly?<text:line-break/>☐ Yes<text:line-break/>☐ No </text:p>
        </text:list-item>
        <text:list-item>
          <text:p text:style-name="P1">Do you monitor your blood sugar levels?<text:line-break/>☐ Daily<text:line-break/>☐ Weekly<text:line-break/>☐ Occasionally<text:line-break/>☐ Never </text:p>
        </text:list-item>
        <text:list-item>
          <text:p text:style-name="P1">Do you have a family history of Diabetes?<text:line-break/>☐ Yes<text:line-break/>☐ No </text:p>
        </text:list-item>
        <text:list-item>
          <text:p text:style-name="P2">Do you follow a special diet?<text:line-break/>☐ Yes<text:line-break/>☐ No </text:p>
        </text:list-item>
      </text:list>
      <text:p text:style-name="Horizontal_20_Line"/>
      <text:h text:style-name="Heading_20_3" text:outline-level="3">Feedback</text:h>
      <text:list text:style-name="L2">
        <text:list-item>
          <text:p text:style-name="P4">Are you aware of the complications associated with Diabetes?<text:line-break/>☐ Yes<text:line-break/>☐ No </text:p>
        </text:list-item>
        <text:list-item>
          <text:p text:style-name="P5">What challenges do you face in managing Diabetes?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11:48:47.304813000</meta:creation-date>
    <dc:date>2026-06-21T11:50:25.688472000</dc:date>
    <meta:editing-duration>PT1M39S</meta:editing-duration>
    <meta:editing-cycles>1</meta:editing-cycles>
    <meta:document-statistic meta:table-count="0" meta:image-count="0" meta:object-count="0" meta:page-count="1" meta:paragraph-count="16" meta:word-count="133" meta:character-count="710" meta:non-whitespace-character-count="595"/>
    <meta:generator>LibreOffice/26.2.4.2$MacOSX_AARCH64 LibreOffice_project/0229ac93fcf0d7cbc6376066c6f35021cef002dc</meta:generator>
  </office:meta>
</office:document-meta>
</file>